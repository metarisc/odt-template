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media-type="image/png" manifest:full-path="Pictures/IMGd41d8cd98f00b204e9800998ecf8427e"/>
  <manifest:file-entry manifest:media-type="image/png" manifest:full-path="Pictures/IMGd41d8cd98f00b204e9800998ecf8427e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433eb3" officeooo:paragraph-rsid="00433eb3"/>
    </style:style>
    <style:style style:name="P2" style:family="paragraph" style:parent-style-name="Standard" style:list-style-name="L1"/>
    <style:style style:name="P3" style:family="paragraph" style:parent-style-name="Table_20_Contents">
      <style:text-properties officeooo:rsid="003e609b" officeooo:paragraph-rsid="003e60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style:style style:name="pagebreak" style:family="paragraph">
      <style:paragraph-properties fo:break-before="pag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</text:list-style>
    <text:list-style style:name="L2">
      <text:list-level-style-number text:level="1" text:display-levels="1" style:num-format="1" style:num-suffix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L3">
      <text:list-level-style-bullet text:level="1" text:bullet-char="☐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</text:list-style>
    <style:style style:name="PA0" style:family="paragraph">
      <style:paragraph-properties fo:text-align="center"/>
      <style:text-properties fo:font-size="18pt" fo:font-weight="bold"/>
    </style:style>
    <style:style style:name="PA1" style:family="paragraph">
      <style:paragraph-properties fo:text-align="center"/>
      <style:text-properties fo:font-size="16pt" fo:font-weight="bold"/>
    </style:style>
    <style:style style:name="PA2" style:family="paragraph">
      <style:paragraph-properties fo:text-align="center"/>
      <style:text-properties fo:font-size="14pt" fo:font-weight="bold"/>
    </style:style>
    <style:style style:name="PA3" style:family="paragraph">
      <style:paragraph-properties fo:text-align="center"/>
      <style:text-properties fo:font-size="12pt" fo:font-weight="bold"/>
    </style:style>
    <style:style style:name="T4" style:family="text">
      <style:text-properties fo:font-weight="bold"/>
    </style:style>
    <style:style style:name="TC5" style:family="table-cell">
      <style:table-cell-properties fo:padding="0.097cm" fo:border="0.5pt solid #000000" fo:background-color="#CCCCCC"/>
    </style:style>
    <style:style style:name="T6" style:family="text">
      <style:text-properties fo:font-style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ed1f0f"/>
    </style:style>
    <style:style style:name="PA9" style:family="paragraph">
      <style:paragraph-properties fo:break-before="page"/>
    </style:style>
    <style:style style:name="T10" style:family="text">
      <style:text-properties fo:font-weight="bold" fo:font-style="italic" style:text-underline-style="solid" style:text-underline-width="auto" style:text-underline-color="font-color"/>
    </style:style>
    <style:style style:name="T11" style:family="text">
      <style:text-properties fo:color="#2196F3"/>
    </style:style>
    <style:style style:name="T12" style:family="text">
      <style:text-properties fo:background-color="#EF9A9A"/>
    </style:style>
    <style:style style:name="PA13" style:family="paragraph">
      <style:paragraph-properties fo:text-align="cente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1</text:p>
      <text:p/>
      <text:p/>
      <text:p/>
      <text:p/>
      <text:p/>
      <text:p/>
      <text:p/>
      <text:h text:style-name="PA0" text:outline-level="1">Titre du dossier pour Loup</text:h>
      <text:h text:style-name="PA1" text:outline-level="2">sous titre</text:h>
      <text:h text:style-name="PA2" text:outline-level="3">sous-sous titre</text:h>
      <text:h text:style-name="PA3" text:outline-level="4">sous-sous-sous titre</text:h>
      <text:p/>
      <table:table table:name="Table1" table:style-name="Table1">
        <table:table-column table:style-name="Table1.A" table:number-columns-repeated="4"/>
        <table:table-row>
          <table:table-cell table:style-name="TC5" office:value-type="string">
            <text:p><text:span text:style-name="T4">Rédacteur</text:span></text:p>
          </table:table-cell>
          <table:table-cell table:style-name="TC5" office:value-type="string">
            <text:p><text:span text:style-name="T4">Structure</text:span></text:p>
          </table:table-cell>
          <table:table-cell table:style-name="TC5" office:value-type="string" table:number-columns-spanned="2">
            <text:p><text:span text:style-name="T4">Date</text:span></text:p>
          </table:table-cell>
        </table:table-row>
        <table:table-row>
          <table:table-cell table:style-name="Table1.A1" office:value-type="string">
            <text:p><text:span text:style-name="T6">Gauthier Legrand</text:span></text:p>
          </table:table-cell>
          <table:table-cell table:style-name="Table1.A1" office:value-type="string">
            <text:p><text:span text:style-name="T7">SDIS62</text:span></text:p>
          </table:table-cell>
          <table:table-cell table:style-name="Table1.A1" office:value-type="string">
            <text:p><text:span text:style-name="T8">13/01/2025</text:span></text:p>
          </table:table-cell>
          <table:table-cell table:style-name="Table1.A1" office:value-type="string">
            <text:p>09:00</text:p>
          </table:table-cell>
        </table:table-row>
      </table:table>
      <text:p/>
      <text:p text:style-name="PA9"/>
      <text:p/>
      <text:p/>
      <text:p><text:span text:style-name="T10">Première page</text:span> <text:span text:style-name="T11">du</text:span> <text:span text:style-name="T12">document</text:span></text:p>
      <text:p/>
      <text:p text:style-name="PA13">
      <draw:frame text:anchor="aschar" svg:width="5340" svg:height="3260">
                    <draw:image xlink:href="https://www.dlsu.edu.ph/wp-content/uploads/2018/11/300x300-placeholder.jpg"/>
                </draw:frame>
    </text:p>
      <text:list text:style-name="L1">
        <text:list-item>
          <text:p>Point 1</text:p>
        </text:list-item>
        <text:list-item>
          <text:p>Point 2</text:p>
        </text:list-item>
        <text:list-item>
          <text:list text:style-name="L1">
            <text:list-item>
              <text:p>Point 2.1</text:p>
            </text:list-item>
            <text:list-item>
              <text:list text:style-name="L1">
                <text:list-item>
                  <text:p>Point 2.1.1</text:p>
                </text:list-item>
              </text:list>
            </text:list-item>
          </text:list>
        </text:list-item>
      </text:list>
      <text:p>
      <text:p>droite</text:p>
      <text:list text:style-name="L2">
        <text:list-item>
          <text:p>point 1</text:p>
        </text:list-item>
        <text:list-item>
          <text:p>Point 2</text:p>
        </text:list-item>
        <text:list-item>
          <text:list text:style-name="L2">
            <text:list-item>
              <text:p>Point 2.1</text:p>
            </text:list-item>
            <text:list-item>
              <text:list text:style-name="L2">
                <text:list-item>
                  <text:p>Point 2.1.1</text:p>
                </text:list-item>
              </text:list>
            </text:list-item>
          </text:list>
        </text:list-item>
        <text:list-item>
          <text:p>Point 3</text:p>
        </text:list-item>
      </text:list>
    </text:p>
      <text:p>
      <text:p>Citation</text:p>
    </text:p>
      <text:p text:style-name="Standard"/>
      <text:p text:style-name="Standard">Data : </text:p>
      <text:list text:style-name="L1">
        <text:list-item>
          <text:p text:style-name="P2">Value A : &amp;é"(§è!çà</text:p>
        </text:list-item>
        <text:list-item>
          <text:p text:style-name="P2">Value B : -)àç!è§(</text:p>
        </text:list-item>
      </text:list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bar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14 août 1988</text:p>
      <text:p text:style-name="Standard"/>
      <text:h text:outline-level="1">Hello World!</text:h>
      <text:p><draw:frame text:anchor="aschar" svg:width="13.22916665cm" svg:height="13.22916665cm">
                        <draw:image xlink:href="Pictures/IMGd41d8cd98f00b204e9800998ecf8427e" xlink:title="Title"/>
                    </draw:frame>
BOOM</text:p>
      <text:p>
                                    <draw:frame text:anchor="aschar" svg:width="1.322916665cm" svg:height="1.322916665cm">
                                        <draw:image xlink:href="Pictures/IMGd41d8cd98f00b204e9800998ecf8427e" xlink:title="Placeholder Image"/>
                                    </draw:frame>
                               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</text:p>
          </table:table-cell>
          <table:table-cell table:style-name="Table1.B1" office:value-type="string">
            <text:p text:style-name="P3">B</text:p>
          </table:table-cell>
        </table:table-row>
        <table:table-row>
          <table:table-cell table:style-name="Table1.A2" office:value-type="string">
            <text:p text:style-name="Table_20_Contents">foo1</text:p>
          </table:table-cell>
          <table:table-cell table:style-name="Table1.B2" office:value-type="string">
            <text:p text:style-name="Table_20_Contents">bar1</text:p>
          </table:table-cell>
        </table:table-row>
        <table:table-row>
          <table:table-cell table:style-name="Table1.A2" office:value-type="string">
            <text:p text:style-name="Table_20_Contents">foo2</text:p>
          </table:table-cell>
          <table:table-cell table:style-name="Table1.B2" office:value-type="string">
            <text:p text:style-name="Table_20_Contents">bar2</text:p>
          </table:table-cell>
        </table:table-row>
      </table:table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2</text:p>
      <text:p text:style-name="P1">{lexical:ast}</text:p>
      <text:p text:style-name="Standard"/>
      <text:p text:style-name="Standard">Data : </text:p>
      <text:list text:style-name="L1">
        <text:list-item>
          <text:p text:style-name="P2">Value A : -)àç!è§(</text:p>
        </text:list-item>
        <text:list-item>
          <text:p text:style-name="P2">Value B : &amp;é"(§è!çà</text:p>
        </text:list-item>
      </text:list>
      <text:p text:style-name="Standard"/>
      <text:p text:style-name="Standard"/>
      <text:p text:style-name="Standard"/>
      <text:p text:style-name="Standard">baz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 1 janvier 2020</text:p>
      <text:p text:style-name="Standard"/>
      <text:h text:outline-level="4">CLASSEMENT</text:h>
      <text:p>L'établissement est classé en type R de 3ème catégorie.
Avec une activité de Jardins d'enfant
L'effectif total est de 70 personnes: 50 au titre du public et 20 au titre du personnel.</text:p>
      <text:h text:outline-level="4">IMPLANTATION</text:h>
      <text:list>
        <text:list-item>
          <text:p>Le bâtiment se compose de 2 niveaux en superstructure</text:p>
        </text:list-item>
        <text:list-item>
          <text:p>Le bâtiment est de plain-pied.</text:p>
        </text:list-item>
        <text:list-item>
          <text:p>Le plancher bas du dernier niveau accessible au public est =&gt;8m.
Il est desservi par <text:span text:style-name="T1">1</text:span> voie(s) engin.</text:p>
        </text:list-item>
      </text:list>
      <text:h text:outline-level="4">CONSTRUCTION</text:h>
      <text:p>La stabilité au feu de la structure de l'établissement est de degré 2h.
La stabilité au feu des planchers de l'établissement est de degré 3h.</text:p>
      <text:h text:outline-level="4">VENTILATION / DESENFUMAGE</text:h>
      <text:p>L'établissement est désenfumé mécaniquement.
L'établissement est désenfumé naturellement.</text:p>
      <text:h text:outline-level="4">ELECTRICITE / ECLAIRAGE</text:h>
      <text:p>Présence de batteries accumulateurs et matériels associés, ayant pour fonction:</text:p>
      <text:list>
        <text:list-item>
          <text:p>Présence de parafoudre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</text:p>
          </table:table-cell>
          <table:table-cell table:style-name="Table1.B1" office:value-type="string">
            <text:p text:style-name="P3">B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12-11T14:42:53.578671000</dc:date>
    <meta:editing-duration>PT15H8M50S</meta:editing-duration>
    <meta:editing-cycles>52</meta:editing-cycles>
    <meta:generator>LibreOffice/25.8.3.2$MacOSX_AARCH64 LibreOffice_project/8ca8d55c161d602844f5428fa4b58097424e324e</meta:generator>
    <meta:document-statistic meta:table-count="1" meta:image-count="0" meta:object-count="0" meta:page-count="1" meta:paragraph-count="21" meta:word-count="38" meta:character-count="290" meta:non-whitespace-character-count="274"/>
  </office:meta>
</office:document-meta>
</file>